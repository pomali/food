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A100000604F9022537B8CC76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8.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291.71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67.49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ta1" style:family="table" style:master-page-name="PageStyle_5f_search">
      <style:table-properties table:display="true" style:writing-mode="lr-tb"/>
    </style:style>
    <style:style style:name="ta2" style:family="table" style:master-page-name="PageStyle_5f_Recepty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B1]))=0)" style:apply-style-name="ConditionalStyle_5f_1" style:base-cell-address="Recepty.B1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]))=0)" style:apply-style-name="ConditionalStyle_5f_1" style:base-cell-address="Recepty.B1"/>
    </style:style>
    <style:style style:name="ce10" style:family="table-cell" style:parent-style-name="Default">
      <style:map style:condition="is-true-formula(LEN(TRIM([.B1]))=0)" style:apply-style-name="ConditionalStyle_5f_1" style:base-cell-address="Recepty.B1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]))=0)" style:apply-style-name="ConditionalStyle_5f_1" style:base-cell-address="Recepty.B1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]))=0)" style:apply-style-name="ConditionalStyle_5f_1" style:base-cell-address="Recepty.B1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/>
    </style:style>
    <style:style style:name="T2" style:family="text">
      <style:text-properties style:font-name="Cambria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use-window-font-color="true" fo:font-weight="bold" style:font-weight-asian="bold" style:font-weight-complex="bold"/>
    </style:style>
    <style:style style:name="T3" style:family="text">
      <style:text-properties style:font-name="Cambria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use-window-font-color="true" fo:font-weight="normal" style:font-weight-asian="normal" style:font-weight-complex="normal"/>
    </style:style>
    <style:style style:name="T4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Recepty.$A$1:.$A$1048576])" table:allow-empty-cell="true" table:display-list="unsorted" table:base-cell-address="search.A1">
          <table:error-message table:message-type="stop" table:display="true"/>
        </table:content-validation>
        <table:content-validation table:name="val2" table:condition="of:cell-content-is-in-list(&quot;malé&quot;;&quot;veľké&quot;;&quot;polievka&quot;;&quot;koláč&quot;;&quot;príloha&quot;)" table:allow-empty-cell="true" table:display-list="unsorted" table:base-cell-address="Recepty.C2">
          <table:help-message table:display="true">
            <text:p>Click and enter a value from the list of items</text:p>
          </table:help-message>
        </table:content-validation>
        <table:content-validation table:name="val3" table:condition="of:cell-content-is-in-list(&quot;ano&quot;;&quot;nie&quot;;&quot;mozno&quot;;&quot;ano?&quot;;&quot;nie?&quot;)" table:allow-empty-cell="true" table:display-list="unsorted" table:base-cell-address="Recepty.D1"/>
      </table:content-validations>
      <table:table table:name="searc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content-validation-name="val1" office:value-type="string" calcext:value-type="string">
            <text:p>Cestoviny</text:p>
          </table:table-cell>
          <table:table-cell table:number-columns-repeated="1023"/>
        </table:table-row>
        <table:table-row table:style-name="ro2">
          <table:table-cell table:style-name="ce2" table:formula="of:=VLOOKUP([.$A$1];[$Recepty.A$1:.F$1048576]; 2; 0)" office:value-type="float" office:value="0" calcext:value-type="float">
            <text:p/>
          </table:table-cell>
          <table:table-cell table:number-columns-repeated="1023"/>
        </table:table-row>
        <table:table-row table:style-name="ro2">
          <table:table-cell table:style-name="ce3" table:formula="of:=VLOOKUP([.$A$1];[$Recepty.A$1:.F$1048576]; 5; 0)" office:value-type="float" office:value="0" calcext:value-type="float">
            <text:p/>
          </table:table-cell>
          <table:table-cell table:number-columns-repeated="1023"/>
        </table:table-row>
        <table:table-row table:style-name="ro2" table:number-rows-repeated="997">
          <table:table-cell table:style-name="ce4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epty" table:style-name="ta2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9" table:default-cell-style-name="Default"/>
        <table:table-row table:style-name="ro2">
          <table:table-cell table:style-name="ce5" office:value-type="string" calcext:value-type="string">
            <text:p>Nazov</text:p>
          </table:table-cell>
          <table:table-cell table:style-name="ce8" office:value-type="string" calcext:value-type="string">
            <text:p>📃Ingrediencie</text:p>
          </table:table-cell>
          <table:table-cell table:style-name="ce5" office:value-type="string" calcext:value-type="string">
            <text:p>🗄Kategória</text:p>
          </table:table-cell>
          <table:table-cell table:style-name="ce13" table:content-validation-name="val3" office:value-type="string" calcext:value-type="string">
            <text:p>❄️Mrazničkovateľné?</text:p>
          </table:table-cell>
          <table:table-cell table:style-name="ce15" office:value-type="string" calcext:value-type="string">
            <text:p>👨‍🍳Postup</text:p>
          </table:table-cell>
          <table:table-cell table:style-name="ce13" office:value-type="string" calcext:value-type="string">
            <text:p>🔗Linky</text:p>
          </table:table-cell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6" office:value-type="string" calcext:value-type="string">
            <text:p>Palacinky</text:p>
          </table:table-cell>
          <table:table-cell table:style-name="ce9" office:value-type="string" calcext:value-type="string">
            <text:p>- muka 500g</text:p>
            <text:p>- vajcia 6ks</text:p>
            <text:p>- mlieko 1l</text:p>
            <text:p>- sol (stipka)</text:p>
            <text:p>- olej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zmiešame ingrediencie</text:p>
            <text:p>opekáme na panvici s minimom oleja</text:p>
          </table:table-cell>
          <table:table-cell table:style-name="ce17" office:value-type="string" calcext:value-type="string">
            <text:p><text:a xlink:href="https://www.theguardian.com/lifeandstyle/2013/nov/23/what-food-freezes-well-and-what-doesn-t-freeze-well" xlink:type="simple">https://www.theguardian.com/lifeandstyle/2013/nov/23/what-food-freezes-well-and-what-doesn-t-freeze-well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lieb vo vajíčku</text:p>
          </table:table-cell>
          <table:table-cell table:style-name="ce9" office:value-type="string" calcext:value-type="string">
            <text:p>- chlieb</text:p>
            <text:p>- vajicka</text:p>
            <text:p>- majoranka</text:p>
            <text:p>- sol</text:p>
            <text:p>- olej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Praženica</text:p>
          </table:table-cell>
          <table:table-cell table:style-name="ce9" office:value-type="string" calcext:value-type="string">
            <text:p>- vajcia</text:p>
            <text:p>- olej</text:p>
            <text:p>- sol</text:p>
            <text:p>- korenie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Losos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ura na grile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ura na prírodno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?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Bravčové na prírodno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Bravčové na smotane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?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Wok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rupičná kaša</text:p>
          </table:table-cell>
          <table:table-cell table:style-name="ce9" office:value-type="string" calcext:value-type="string">
            <text:p>- krupica 100g</text:p>
            <text:p>- mlieko 1l</text:p>
            <text:p>- cukor 40g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Toasty</text:p>
          </table:table-cell>
          <table:table-cell table:style-name="ce9" office:value-type="string" calcext:value-type="string">
            <text:p>- toastovy chlieb</text:p>
            <text:p>- syr</text:p>
            <text:p>– sunka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Granatir / Granadir</text:p>
          </table:table-cell>
          <table:table-cell table:style-name="ce9" office:value-type="string" calcext:value-type="string">
            <text:p>- zemiaky</text:p>
            <text:p>- cestoviny</text:p>
            <text:p>- olej</text:p>
            <text:p>- mleta paprika</text:p>
            <text:p>- cierne korenie</text:p>
            <text:p>- sol</text:p>
            <text:p>- kysla uhork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Puding</text:p>
          </table:table-cell>
          <table:table-cell table:style-name="ce9" office:value-type="string" calcext:value-type="string">
            <text:p>- mlieko 1l</text:p>
            <text:p>- puding 2ks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Perkelt</text:p>
          </table:table-cell>
          <table:table-cell table:style-name="ce9" office:value-type="string" calcext:value-type="string">
            <text:p>cibula</text:p>
            <text:p>kuracie prsia</text:p>
            <text:p>smotana (cerstva/slahackova)</text:p>
            <text:p>sladka paprika</text:p>
            <text:p>voda</text:p>
            <text:p>cierne korenie</text:p>
            <text:p>sol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 office:value-type="string" calcext:value-type="string">
            <text:p>- cibulu na drobno, oprazime do sklovita</text:p>
            <text:p>- maso na male kocky, posolime, oprazime kym nie je biele</text:p>
            <text:p>- podlejeme vodou, dusime 20-30min</text:p>
            <text:p>- zalejeme slahackou a nechame zovriet</text:p>
            <text:p>- pridame papriku, cierne korenie a sol podla chuti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estoviny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Pizza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Lasagne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uraci salat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Tuniakovy salat</text:p>
          </table:table-cell>
          <table:table-cell table:style-name="ce10"/>
          <table:table-cell table:style-name="ce6" table:content-validation-name="val2"/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Tuniakovy salat so smotanou</text:p>
          </table:table-cell>
          <table:table-cell table:style-name="ce9" office:value-type="string" calcext:value-type="string">
            <text:p>- tuniak</text:p>
            <text:p>- paradajky</text:p>
            <text:p>- kysla smotana</text:p>
            <text:p>- horcica/kecup</text:p>
            <text:p>- korenia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Burger</text:p>
          </table:table-cell>
          <table:table-cell table:style-name="ce9" office:value-type="string" calcext:value-type="string">
            <text:p>- mlete maso</text:p>
            <text:p>- horcica/horcicne semiacko mlete</text:p>
            <text:p>- korenie</text:p>
            <text:p>- sol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ukurickovy salat</text:p>
          </table:table-cell>
          <table:table-cell table:style-name="ce9" office:value-type="string" calcext:value-type="string">
            <text:p>- kukurica</text:p>
            <text:p>- smotana (kysla)</text:p>
            <text:p>- vajicko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Vlastne cestoviny</text:p>
          </table:table-cell>
          <table:table-cell table:style-name="ce9" office:value-type="string" calcext:value-type="string">
            <text:p>- vajce</text:p>
            <text:p>- muka</text:p>
            <text:p>- vod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Panenka na masle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Spenat s vajcom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Zeleninova polievka</text:p>
          </table:table-cell>
          <table:table-cell table:style-name="ce10"/>
          <table:table-cell table:style-name="ce6" table:content-validation-name="val2" office:value-type="string" calcext:value-type="string">
            <text:p>polievka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Cesnakova polievka (kremova)</text:p>
          </table:table-cell>
          <table:table-cell table:style-name="ce9" office:value-type="string" calcext:value-type="string">
            <text:p>- 8+ strucikov cesnaku</text:p>
            <text:p>- 6 strednych zemiakov</text:p>
            <text:p>- maslo</text:p>
            <text:p>- korenie, bobkovy list</text:p>
            <text:p>- zeleninovy vyvar/voda</text:p>
            <text:p>- pecivo na krutony</text:p>
          </table:table-cell>
          <table:table-cell table:style-name="ce6" table:content-validation-name="val2" office:value-type="string" calcext:value-type="string">
            <text:p>polievka</text:p>
          </table:table-cell>
          <table:table-cell table:content-validation-name="val3"/>
          <table:table-cell table:style-name="ce4" office:value-type="string" calcext:value-type="string">
            <text:p>na 4 porcie</text:p>
            <text:p>1,5 hlávky cesnaku + 7 strúčikov cesnaku na záver</text:p>
            <text:p>6 stredne veľkých zemiakov</text:p>
            <text:p>2 PL masla</text:p>
            <text:p>1 l zeleninového vývaru</text:p>
            <text:p>korenie (bobkový list, soľ a čierne korenie)</text:p>
            <text:p>1 PL olivového oleja</text:p>
            <text:p>1 celozrnná bagetka</text:p>
            <text:p>V hrnci si roztopíme maslo, pridáme na kocky nakrájané zemiaky a smažíme asi 2 minúty. Cesnakové strúčiky ošúpeme a pridáme k zemiakom. Pridáme bobkový list, čierne korenie a soľ a zalejeme vývarom. Varíme približne 20 minút, kým sa uvaria zemiaky.</text:p>
            <text:p>Z hrnca vyberieme bobkový list a polievku rozmixujeme.</text:p>
            <text:p>Po rozmixovaní pridáme do polievky čerstvo prelisované strúčiky cesnaku (ja som použila 7 strúčikov), premiešame a môžeme servírovať. Podávame s kúskami opečenej bagetky,</text:p>
          </table:table-cell>
          <table:table-cell table:style-name="ce17" office:value-type="string" calcext:value-type="string">
            <text:p><text:a xlink:href="https://www.lenivakucharka.sk/rychla-cesnakova-polievka/" xlink:type="simple">https://www.lenivakucharka.sk/rychla-cesnakova-polievka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rachova polievka</text:p>
          </table:table-cell>
          <table:table-cell table:style-name="ce10"/>
          <table:table-cell table:style-name="ce6" table:content-validation-name="val2" office:value-type="string" calcext:value-type="string">
            <text:p>polievka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uraci vyvar (polievka)</text:p>
          </table:table-cell>
          <table:table-cell table:style-name="ce10"/>
          <table:table-cell table:style-name="ce6" table:content-validation-name="val2" office:value-type="string" calcext:value-type="string">
            <text:p>polievka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Zemiakovy salat (sviatocny, Stankov)</text:p>
          </table:table-cell>
          <table:table-cell table:style-name="ce9" office:value-type="string" calcext:value-type="string">
            <text:p>- zemiaky</text:p>
            <text:p>- mrkva</text:p>
            <text:p>- hrasok</text:p>
            <text:p>- sol</text:p>
            <text:p>- cierne korenie</text:p>
            <text:p>- kysle uhorky</text:p>
            <text:p>- cibula</text:p>
            <text:p>- majonez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zemiaky uvarime v supke (neosolena voda), kym nebudu velmi makke, </text:p>
            <text:p>zemiaky osupeme, nakrajame na hranolceky, </text:p>
            <text:p>ostatnu zeleninu rozmrazime ak je mrazena (v horucej vode) </text:p>
            <text:p>cibulu na jemno, kysle uhorky na male kockym,</text:p>
            <text:p>mrkvu trochu povarime kym nie je makka, nakrajame na male kocky</text:p>
            <text:p>vsetko premiesavame, (mozno dokyslit citronom v pripade potreby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Zemiakovy salat (sviatocny, Frankin)</text:p>
          </table:table-cell>
          <table:table-cell table:style-name="ce9" office:value-type="string" calcext:value-type="string">
            <text:p>- zemiaky</text:p>
            <text:p>- sol</text:p>
            <text:p>- cierne korenie</text:p>
            <text:p>- kukurica</text:p>
            <text:p>- hrasok</text:p>
            <text:p>- majonez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Sosovicova polievka (vianocna)</text:p>
          </table:table-cell>
          <table:table-cell table:style-name="ce9" office:value-type="string" calcext:value-type="string">
            <text:p>- sosovica 125g</text:p>
            <text:p>- petrzlen</text:p>
            <text:p>- mrkva</text:p>
            <text:p>- cesnak</text:p>
            <text:p>- biele korenie melte</text:p>
            <text:p>- kysla smotana</text:p>
            <text:p>- bobkový list?</text:p>
          </table:table-cell>
          <table:table-cell table:style-name="ce6" table:content-validation-name="val2" office:value-type="string" calcext:value-type="string">
            <text:p>polievka</text:p>
          </table:table-cell>
          <table:table-cell table:content-validation-name="val3"/>
          <table:table-cell table:style-name="ce4" office:value-type="string" calcext:value-type="string">
            <text:p>štandardne robíme z 2x dávky (250g šošovice) , vody dosť iba na zakrytie zeleniny, šošovicu namočiť dopredu, zeleninu na polkolieska, cesnak roztlačený dlaňou , kyslá smotana na koniec 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Kapustnica (vianocna)</text:p>
          </table:table-cell>
          <table:table-cell table:style-name="ce9" office:value-type="string" calcext:value-type="string">
            <text:p>- kysla kapusta</text:p>
            <text:p>- klobasa</text:p>
            <text:p>- hriby</text:p>
            <text:p>- cibula</text:p>
            <text:p>- mleta paprika</text:p>
            <text:p>- (korenia ktore idu do klobasy ak je klobasa slaba)</text:p>
            <text:p>- (cesnak)</text:p>
            <text:p>- (cierne korenie)</text:p>
            <text:p>- (chilli)</text:p>
            <text:p/>
            <text:p/>
            <text:p>- priloha sladka smotana</text:p>
          </table:table-cell>
          <table:table-cell table:style-name="ce6" table:content-validation-name="val2" office:value-type="string" calcext:value-type="string">
            <text:p>polievka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časť klobás na kolieska (moze byt po uvareni, vybrat, nakrajat, vratit), čas klobás suchá časť vlhká, asi 1kg kapusty na 4-5 porcie</text:p>
            <text:p/>
            <text:p>nakrajame cibulu na drobno, nakrajame plece/maso na kocky, oprazime cibulu do priesvitna, pridame papriku, pridame nakrajane plece, </text:p>
            <text:p>trochu vytopime mast, pridame kapustu, s kapustovou vodou a vodou, pridame ostatne suroviny, varime aspon hodinu (kym nie je kapusta makka)</text:p>
            <text:p/>
            <text:p>mozeme vybrat a nakrajat klobasu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bovka</text:p>
          </table:table-cell>
          <table:table-cell table:style-name="ce10"/>
          <table:table-cell table:style-name="ce6" table:content-validation-name="val2" office:value-type="string" calcext:value-type="string">
            <text:p>koláč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orejske mlete maso s ryzou (bulgogi)</text:p>
          </table:table-cell>
          <table:table-cell table:style-name="ce9" office:value-type="string" calcext:value-type="string">
            <text:p>1 pound lean ground beef (90% lean)</text:p>
            <text:p>3 garlic cloves, minced</text:p>
            <text:p>¼ cup packed brown sugar</text:p>
            <text:p>¼ cup reduced-sodium soy sauce</text:p>
            <text:p>2 teaspoons sesame oil</text:p>
            <text:p>¼ teaspoon ground ginger</text:p>
            <text:p>¼ teaspoon crushed red pepper flakes</text:p>
            <text:p>¼ teaspoon pepper</text:p>
            <text:p>2 cups hot cooked white or brown rice</text:p>
            <text:p>sliced green onions and sesame seeds for garnish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1. In a large skillet cook the ground beef and garlic breaking it into crumbles over medium heat until no longer pink.</text:p>
            <text:p>2. In a small bowl whisk brown sugar, soy sauce, sesame oil, ginger, red pepper flakes and pepper. Pour over the ground beef and let simmer for another minute or two.</text:p>
            <text:p>3. Serve over hot rice and garnish with green onions and sesame seeds.</text:p>
          </table:table-cell>
          <table:table-cell table:style-name="ce17" office:value-type="string" calcext:value-type="string">
            <text:p><text:a xlink:href="https://therecipecritic.com/korean-ground-beef-rice-bowls/" xlink:type="simple">https://therecipecritic.com/korean-ground-beef-rice-bowls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lnena paprika</text:p>
          </table:table-cell>
          <table:table-cell table:style-name="ce9" office:value-type="string" calcext:value-type="string">
            <text:p>- ryza</text:p>
            <text:p>- mlete maso</text:p>
            <text:p>- cibula</text:p>
            <text:p>- paprika</text:p>
            <text:p>- paradajkovy pretlak</text:p>
            <text:p>- cierne korenie</text:p>
            <text:p>- bobkovy list</text:p>
            <text:p>- nove korenie</text:p>
            <text:p>- </text:p>
            <text:p>- ???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paradajkova polievka</text:p>
          </table:table-cell>
          <table:table-cell table:style-name="ce10"/>
          <table:table-cell table:style-name="ce6" table:content-validation-name="val2" office:value-type="string" calcext:value-type="string">
            <text:p>polievka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hraskovy krem</text:p>
          </table:table-cell>
          <table:table-cell table:style-name="ce9" office:value-type="string" calcext:value-type="string">
            <text:p>- 4 hrnceky hrasku</text:p>
            <text:p>- 3 hrnceky vody</text:p>
            <text:p>- bujon</text:p>
            <text:p>- (mlada cibulka), (por), (cesnak)</text:p>
            <text:p>- (maslo/olej/olivovy olej)</text:p>
            <text:p>- (tymian)</text:p>
            <text:p>- cierne korenie, sol</text:p>
            <text:p>- (smotana), (mlieko)</text:p>
            <text:p>- (slanina)</text:p>
          </table:table-cell>
          <table:table-cell table:style-name="ce6" table:content-validation-name="val2" office:value-type="string" calcext:value-type="string">
            <text:p>polievka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povarime hrasok kym nie je roztopeny, premixujeme tycovym mixerom, mozeme prepasirovat, mozno pridat zemiak alebo zaprazku na zahustenie.</text:p>
            <text:p/>
          </table:table-cell>
          <table:table-cell table:style-name="ce17" office:value-type="string" calcext:value-type="string">
            <text:p><text:a xlink:href="https://www.pottenpannen.sk/recepty-a-rady/hraskovy-krem-podla-zdenka-pohlreicha" xlink:type="simple">https://www.pottenpannen.sk/recepty-a-rady/hraskovy-krem-podla-zdenka-pohlreicha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avcova panenka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"bolonska omacka"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acacie prsia (s kozou)</text:p>
          </table:table-cell>
          <table:table-cell table:style-name="ce9" office:value-type="string" calcext:value-type="string">
            <text:p>kacacie prsi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 office:value-type="string" calcext:value-type="string">
            <text:p>na pancvici opekame na strane s kozou, ked je koza trochu zapecena mozeme kruzivym pohybom rozhybat na panvici, lepsie sa opecie. obratime alebo dame dopiect do truby na 200°C na 6-8min</text:p>
          </table:table-cell>
          <table:table-cell table:style-name="ce17" office:value-type="string" calcext:value-type="string">
            <text:p><text:a xlink:href="https://recepty.aktuality.sk/recept/8238/pecene-kacacie-prsia-zakladny-recept/" xlink:type="simple">https://recepty.aktuality.sk/recept/8238/pecene-kacacie-prsia-zakladny-recept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yndzove halusky</text:p>
          </table:table-cell>
          <table:table-cell table:style-name="ce9" office:value-type="string" calcext:value-type="string">
            <text:p>zemiaky</text:p>
            <text:p>polohruba muka</text:p>
            <text:p>sol</text:p>
            <text:p>bryndza</text:p>
            <text:p>slanin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cestoviny aglio e olio</text:p>
          </table:table-cell>
          <table:table-cell table:style-name="ce9" office:value-type="string" calcext:value-type="string">
            <text:p>cestoviny</text:p>
            <text:p>cesnak (na platky)</text:p>
            <text:p>olivovy olej</text:p>
            <text:p>sol, korenie, (+chili), (+citron), (+petrzlen), (+syr)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 office:value-type="string" calcext:value-type="string">
            <text:p>1. uvarit cestoviny ale nie uplne, nechat vo vode</text:p>
            <text:p>2. v panvici na miernom plameni zohriat korenie, pridat olej a zohriat cesnak</text:p>
            <text:p>3. primiesat cestoviny s trochou vody z varenia a miesat aby vznikla emulzia (na miernom plameni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ace instantne jedlo</text:p>
          </table:table-cell>
          <table:table-cell table:style-name="ce9" office:value-type="string" calcext:value-type="string">
            <text:p>karbohydraty (cestovina), omacka, protein (maso), zelenink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Alternacie:</text:p>
            <text:p>- Kabohydraty: cestovina, kuskus, predvarena ryza, predvarene cestoviny, ovsene vlocky</text:p>
            <text:p>- Protein: maso, ryba, predvarena strukovina/strukovinova pasta</text:p>
            <text:p>- Zelenina: mrkva, petrzlen, celer, mlada cibula, por, hrasok, kukurica, zazvor, redkvicka, limetka</text:p>
            <text:p>- Omacka: bujon, paradajkova omacka, sojova omacka</text:p>
          </table:table-cell>
          <table:table-cell table:style-name="ce17" office:value-type="string" calcext:value-type="string">
            <text:p><text:a xlink:href="https://www.seriouseats.com/2014/09/diy-instant-noodle-cups-food-lab.html" xlink:type="simple">https://www.seriouseats.com/2014/09/diy-instant-noodle-cups-food-lab.html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omace instante jedlo (vifonka)</text:p>
          </table:table-cell>
          <table:table-cell table:style-name="ce9" office:value-type="string" calcext:value-type="string">
            <text:p>rychlovariace rezance, maso, zelenina, bujon</text:p>
          </table:table-cell>
          <table:table-cell table:style-name="ce6" table:content-validation-name="val2" office:value-type="string" calcext:value-type="string">
            <text:p>polievka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maso na male platky a opecieme, pokrajame zeleninu na drobno, vsetko vlozime do nadoby a do chladnicky</text:p>
            <text:p>ked sme hladni zalejeme horucou vodou a pockame ~5 minut</text:p>
          </table:table-cell>
          <table:table-cell table:style-name="ce17" office:value-type="string" calcext:value-type="string">
            <text:p><text:a xlink:href="https://thestonesoup.com/blog/2012/02/13/the-quickest-easiest-way-to-make-a-hot-meal-without-a-kitchen/" xlink:type="simple">https://thestonesoup.com/blog/2012/02/13/the-quickest-easiest-way-to-make-a-hot-meal-without-a-kitchen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ulas</text:p>
          </table:table-cell>
          <table:table-cell table:style-name="ce9" office:value-type="string" calcext:value-type="string">
            <text:p>maso 1kg</text:p>
            <text:p>cibula 0.2kg</text:p>
            <text:p>cesnak</text:p>
            <text:p>mast/olej</text:p>
            <text:p>zemiaky 1kg</text:p>
            <text:p>majoranka</text:p>
            <text:p>mleta rasca</text:p>
            <text:p>mleta sladka paprika</text:p>
            <text:p>sol</text:p>
            <text:p>korenie</text:p>
            <text:p>chlieb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(vsetko spolu) </text:p>
            <text:p>nakrajanu cibulu osmahneme, </text:p>
            <text:p>osmahneme nakrajane maso, </text:p>
            <text:p>osolime, okorenime, zalejeme vodou,</text:p>
            <text:p>pridame zemiaky,</text:p>
            <text:p>varime kym nie sme prilis hladni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Zemiakova / Majorankova polievka</text:p>
          </table:table-cell>
          <table:table-cell table:style-name="ce9" office:value-type="string" calcext:value-type="string">
            <text:p>Zemiaky 0.5kg</text:p>
            <text:p>majoranka 1lyzicka</text:p>
            <text:p>sol</text:p>
            <text:p>olej + muka na zaprazku</text:p>
            <text:p>voda</text:p>
          </table:table-cell>
          <table:table-cell table:style-name="ce6" table:content-validation-name="val2" office:value-type="string" calcext:value-type="string">
            <text:p>polievka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 office:value-type="string" calcext:value-type="string">
            <text:p>urobime zaprazku, zalejeme ju,</text:p>
            <text:p>osolime,</text:p>
            <text:p>nakrajane zemiaky vhodime do vody,</text:p>
            <text:p>ked su zemiaky hotove pridame majoranku (prip. vegetu)</text:p>
            <text:p>nechame prevriet</text:p>
            <text:p>dosolime podla chuti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varohove gulky</text:p>
          </table:table-cell>
          <table:table-cell table:style-name="ce9" office:value-type="string" calcext:value-type="string">
            <text:p>tvaroh 500g</text:p>
            <text:p>krupica 100g</text:p>
            <text:p>vajicko 2ks</text:p>
            <text:p>sol (stipka)</text:p>
            <text:p>napln (napr. ovocie)</text:p>
            <text:p>vanilkovy cukor</text:p>
            <text:p>cukor (podla chuti)</text:p>
            <text:p/>
            <text:p>maslo, struhanka, praskovy cukor na posypku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vepro knedlo zelo</text:p>
          </table:table-cell>
          <table:table-cell table:style-name="ce9" office:value-type="string" calcext:value-type="string">
            <text:p>- bravcove maso (kare/krkovicka)</text:p>
            <text:p>- kapusta (cerstva alebo kysla)</text:p>
            <text:p>- cesnak</text:p>
            <text:p>- cibula</text:p>
            <text:p>- suche cervene vino (alebo ocot)</text:p>
            <text:p>- (cukor/med)</text:p>
            <text:p>- (zemiak)</text:p>
            <text:p>- rasca</text:p>
            <text:p>- (korenie)</text:p>
            <text:p>- sol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 office:value-type="string" calcext:value-type="string">
            <text:p>Maso: do masa vlozime cesnakove struciky rozrezane na polovicky,</text:p>
            <text:p>osolime ho, posypeme rascou, dame do pekaca (mozeme dat cibulu na spodok)</text:p>
            <text:p>pecieme otvorene cca 1.5-2h na 200ºC (vnutorna teplota ~80ºC), </text:p>
            <text:p>ak treba podlievame vriacou vodou a prelievame maso vypekom</text:p>
            <text:p/>
            <text:p>Kapusta: cibulu na kococky dame oprazit na oleji, pridame kapustu, </text:p>
            <text:p>posolime (~1lyzicka na pol hlavicky), dame rascu a nechame dusit (zakryte) </text:p>
            <text:p>za obcasneho miesania na strednom plameni cca 40min.</text:p>
            <text:p/>
            <text:p>Knedlu naparime</text:p>
          </table:table-cell>
          <table:table-cell table:style-name="ce17" office:value-type="string" calcext:value-type="string">
            <text:p><text:a xlink:href="https://urobsisam.zoznam.sk/recepty/recept-na-tradicny-nedelny-obed-alebo-vepro-knedlo-zelo" xlink:type="simple">https://urobsisam.zoznam.sk/recepty/recept-na-tradicny-nedelny-obed-alebo-vepro-knedlo-zelo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uracie kridielka</text:p>
          </table:table-cell>
          <table:table-cell table:style-name="ce9" office:value-type="string" calcext:value-type="string">
            <text:p>- kuracie kridielka</text:p>
            <text:p>- sol</text:p>
            <text:p>- cierne korenie</text:p>
            <text:p>- stiplava paprika</text:p>
            <text:p>- granulovany cesnak</text:p>
            <text:p>- prasok do peciv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 office:value-type="string" calcext:value-type="string">
            <text:p>urobime zmes, maso osusime, premiesame</text:p>
            <text:p> a ulozime na plech (idealne mriezku), ok aj obycajny</text:p>
            <text:p/>
            <text:p>a pri 200 C pecieme 1h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zemiakovy privarok na kyslo</text:p>
          </table:table-cell>
          <table:table-cell table:style-name="ce10"/>
          <table:table-cell table:style-name="ce6" table:content-validation-name="val2"/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"socialisticke" rožky</text:p>
          </table:table-cell>
          <table:table-cell table:style-name="ce9" office:value-type="string" calcext:value-type="string">
            <text:p>rozkvas</text:p>
            <text:p>- 200g hladka muka</text:p>
            <text:p>- 200g voda</text:p>
            <text:p>- 2PL kvasok</text:p>
            <text:p/>
            <text:p>cesto</text:p>
            <text:p>- 350g hladkej muky</text:p>
            <text:p>- 150g polohrubej muky</text:p>
            <text:p>- 150g mlieka</text:p>
            <text:p>- 50g masla</text:p>
            <text:p>- 30g bravcovej masti (/hera)</text:p>
            <text:p>- 2 vajecne zltka</text:p>
            <text:p>- 2-3 lyzicky soli</text:p>
            <text:p>- 2 lyzicky "sladenky" (alebo medu)</text:p>
          </table:table-cell>
          <table:table-cell table:style-name="ce6" table:content-validation-name="val2" office:value-type="string" calcext:value-type="string">
            <text:p>príloha</text:p>
          </table:table-cell>
          <table:table-cell table:content-validation-name="val3"/>
          <table:table-cell table:style-name="ce4" office:value-type="string" calcext:value-type="string">
            <text:p>rozkvas 6-12h (bublinky, dvojnasobok,...) izbova teplota</text:p>
            <text:p/>
            <text:p>zmiesame vsetko ostatne, kym nie je hladke nelepive cesto</text:p>
            <text:p>kysnutie 4-6h (do zdvojnasobenia) izbova teplota</text:p>
            <text:p>rozdelit na 12ks cca 100g, gulicky premiesime, nechame kysnut  15min</text:p>
            <text:p>valcekom rozvalkat na trojuholnik, zrolovat do rozku, polozit na papier na pecenie</text:p>
            <text:p>kysnutie 2-4h (do zdvojnasobenia) </text:p>
            <text:p/>
            <text:p>plech nechame zohriat v trube na 225°C, na ten prenesieme papier na pecenie s rozkami</text:p>
            <text:p>po zohriati truby, rozky poprasime vodou, vlozime do rury, </text:p>
            <text:p>pecieme na  225°C 5min, znizime teplotu na 190°C 7-10min</text:p>
            <text:p>prenesieme na mriezku, prekryjeme utierkou</text:p>
            <text:p/>
            <text:p>(vsetky kvasenia su prekryte foliou alebo pod.)</text:p>
          </table:table-cell>
          <table:table-cell table:style-name="ce17" office:value-type="string" calcext:value-type="string">
            <text:p><text:a xlink:href="https://kvaskovanie.sk/socialisticke-rozky/" xlink:type="simple">https://kvaskovanie.sk/socialisticke-rozky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izza (kvaskova)</text:p>
          </table:table-cell>
          <table:table-cell table:style-name="ce9" office:value-type="string" calcext:value-type="string">
            <text:p>rozkvas</text:p>
            <text:p>- 100g kvasku (2PL)</text:p>
            <text:p>- 100g muky</text:p>
            <text:p>- 80ml vody</text:p>
            <text:p>cesto</text:p>
            <text:p>- 150g rozkvasu</text:p>
            <text:p>- 500g muky</text:p>
            <text:p>- 300ml vody</text:p>
            <text:p>- 2-3PL oleja</text:p>
            <text:p>- 12g soli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rozkvas 6-9h</text:p>
            <text:p>cesto 15min v robotovi, 10-12h v chladnicke + 3-4h izbova teplota</text:p>
            <text:p>rozdelit na 4 casti</text:p>
            <text:p>pecenie podla teploty a truby cca 6-14min</text:p>
          </table:table-cell>
          <table:table-cell table:style-name="ce17" office:value-type="string" calcext:value-type="string">
            <text:p><text:a xlink:href="https://www.zosrdcadohrnca.sk/2018/05/07/kvaskova-pizza/" xlink:type="simple">https://www.zosrdcadohrnca.sk/2018/05/07/kvaskova-pizza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rapy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pečené bravčové s cesnakom</text:p>
          </table:table-cell>
          <table:table-cell table:style-name="ce10"/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lievance kváskové</text:p>
          </table:table-cell>
          <table:table-cell table:style-name="ce9" office:value-type="string" calcext:value-type="string">
            <text:p>- hrnček múky (300ml)</text:p>
            <text:p>- hrnček mlieka</text:p>
            <text:p>- 1 vajce</text:p>
            <text:p>- 2-3 PL cukru</text:p>
            <text:p>- 100-150g kvásku</text:p>
            <text:p>- štipka soli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content-validation-name="val3"/>
          <table:table-cell table:style-name="ce4" office:value-type="string" calcext:value-type="string">
            <text:p>zmiešame</text:p>
            <text:p>3-4 hodiny necháme kysnúť na izbovej teplote</text:p>
            <text:p>robíme na panvici na strednom plameni</text:p>
          </table:table-cell>
          <table:table-cell table:style-name="ce17" office:value-type="string" calcext:value-type="string">
            <text:p><text:a xlink:href="https://kvaskovanie.sk/paperove-lievance/" xlink:type="simple">https://kvaskovanie.sk/paperove-lievance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vaskovy chlieb ("KOVID")</text:p>
          </table:table-cell>
          <table:table-cell table:style-name="ce9" office:value-type="string" calcext:value-type="string">
            <text:p>Starter</text:p>
            <text:p>- 150 g pšeničnej múky (hladkej alebo polohrubej)</text:p>
            <text:p>- 150 g vody</text:p>
            <text:p>- 1 PL materského kvásku</text:p>
            <text:p/>
            <text:p>Cesto</text:p>
            <text:p>- 300 g pšeničnej múky (hladkej alebo polohrubej)</text:p>
            <text:p>- 2 PL krupice (nie je nutná, ale cestu len prospeje) / ak nemáme, pozri dole v postupe</text:p>
            <text:p>- 170 g vody</text:p>
            <text:p>- 1 uvarený a najemno nastrúhaný stredne veľký zemiak</text:p>
            <text:p>- 2 ČL soli</text:p>
            <text:p>- 1 ČL mletej rasce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<text:span text:style-name="T1">Urobime starter, nechame kvasit </text:span><text:span text:style-name="T2">9-12h</text:span><text:span text:style-name="T3"> pri izbovej teplote.</text:span></text:p>
            <text:p><text:span text:style-name="T4">Pridame ostatne suroviny a urobime cesto, </text:span></text:p>
            <text:p><text:span text:style-name="T1">nechame kvasit</text:span><text:span text:style-name="T2"> 2h </text:span><text:span text:style-name="T3">pri izbovej teplote, po hodine trochu premiesime.</text:span></text:p>
            <text:p><text:span text:style-name="T4">750g osatku vytrieme skrobom, vlozime cesto do osatky, </text:span></text:p>
            <text:p><text:span text:style-name="T1">nechame kvasit </text:span><text:span text:style-name="T2">2-3h </text:span><text:span text:style-name="T3">pri izbovej teplote.</text:span></text:p>
            <text:p><text:span text:style-name="T4">Trubu vyhrejeme na 250°C aj s plechom, pecieme s parou 10 minut. </text:span></text:p>
            <text:p><text:span text:style-name="T4">Potom odvetrame paru a znizime teplotu na 200 stupnov, pecieme 20 minut.</text:span></text:p>
            <text:p><text:span text:style-name="T4">Chlieb musi zniet duto zo spodu</text:span></text:p>
            <text:p><text:span text:style-name="T4"/></text:p>
          </table:table-cell>
          <table:table-cell table:style-name="ce17" office:value-type="string" calcext:value-type="string">
            <text:p><text:a xlink:href="https://kvaskovanie.sk/chlieb-kovid/" xlink:type="simple">https://kvaskovanie.sk/chlieb-kovid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oláč tety Jeleňovej (hrnčekový)</text:p>
          </table:table-cell>
          <table:table-cell table:style-name="ce9" office:value-type="string" calcext:value-type="string">
            <text:p>3 vajcia celé</text:p>
            <text:p>2 hrnček múka</text:p>
            <text:p>1 hrnček cukor</text:p>
            <text:p>1 prášok do pečiva (12g)</text:p>
            <text:p>½ hrnček mlieko</text:p>
            <text:p>½ hrnček olej alebo maslo</text:p>
            <text:p>+ ak treba nejake prídavky (kako, kokos,orechy..)</text:p>
            <text:p/>
          </table:table-cell>
          <table:table-cell table:style-name="ce6" table:content-validation-name="val2" office:value-type="string" calcext:value-type="string">
            <text:p>koláč</text:p>
          </table:table-cell>
          <table:table-cell table:content-validation-name="val3"/>
          <table:table-cell table:style-name="ce4" office:value-type="string" calcext:value-type="string">
            <text:p>zmiešať všetko, vyliať na vymastený a posypaný plech, pečieme do zlatista</text:p>
            <text:p>ovocie hadzat na vrch (nie do cesta)</text:p>
            <text:p>pecenie ~20min na 180°C</text:p>
          </table:table-cell>
          <table:table-cell table:style-name="ce17" office:value-type="string" calcext:value-type="string">
            <text:p><text:a xlink:href="https://docs.google.com/document/d/1dH-duyPk_nX9u9Vhx_-BLvviEzV9l0bBR71YKz7Bpd4/edit" xlink:type="simple">https://docs.google.com/document/d/1dH-duyPk_nX9u9Vhx_-BLvviEzV9l0bBR71YKz7Bpd4/edit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ŕmenie lievito madre kvásku</text:p>
          </table:table-cell>
          <table:table-cell table:style-name="ce9" office:value-type="string" calcext:value-type="string">
            <text:p>3n g kvások, 1n g voda, 3n g múka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langose</text:p>
          </table:table-cell>
          <table:table-cell table:style-name="ce9" office:value-type="string" calcext:value-type="string">
            <text:p>Rozkvas:</text:p>
            <text:p>150g muka (hladka)</text:p>
            <text:p>150g voda</text:p>
            <text:p/>
            <text:p>Cesto:</text:p>
            <text:p>850g muka (hladka)</text:p>
            <text:p>300g voda</text:p>
            <text:p>10g soli (2 čL)</text:p>
            <text:p>3g sódy bikarbóny (1 čL)</text:p>
            <text:p>250ml kysla smotana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content-validation-name="val3"/>
          <table:table-cell table:style-name="ce4" office:value-type="string" calcext:value-type="string">
            <text:p>100% hydratacia rozkvas</text:p>
            <text:p>35% hydratacia cesta + kysla smotana (mozno vynechat alebo nahradit mliekom/jogurtom)</text:p>
            <text:p/>
            <text:p>kvasenie izbova teplota 12h (bublinky)</text:p>
            <text:p>cesto izbova teplota 1h</text:p>
            <text:p>cesto chladnicka cez noc</text:p>
            <text:p>bochniky izbova teplota 1h (zdvojnasobenie)</text:p>
            <text:p/>
            <text:p>shallow-fry 1m kazda strana</text:p>
          </table:table-cell>
          <table:table-cell table:style-name="ce18" office:value-type="string" calcext:value-type="string">
            <text:p><text:a xlink:href="https://nelkafood.sk/bozske-langose-z-kvasku/" xlink:type="simple">https://nelkafood.sk/bozske-langose-z-kvasku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rehke cesto/tart/pie/short dough/pâte brisée/pâte sucrée</text:p>
          </table:table-cell>
          <table:table-cell table:style-name="ce9" office:value-type="string" calcext:value-type="string">
            <text:p>200g hladka muka</text:p>
            <text:p>100g masla</text:p>
            <text:p>1g soli</text:p>
            <text:p>1 vajce (alebo iba zltko)</text:p>
            <text:p>ľadová voda po lyžičkách (podla vajca, vlhkosti, teploty...)</text:p>
            <text:p>(1 PL cukru)</text:p>
          </table:table-cell>
          <table:table-cell table:style-name="ce6" table:content-validation-name="val2" office:value-type="string" calcext:value-type="string">
            <text:p>koláč</text:p>
          </table:table-cell>
          <table:table-cell table:style-name="ce14" table:content-validation-name="val3" office:value-type="string" calcext:value-type="string">
            <text:p>mozno</text:p>
          </table:table-cell>
          <table:table-cell table:style-name="ce4" office:value-type="string" calcext:value-type="string">
            <text:p>- do mixeru (na sekanie) dame suche ingrediencie</text:p>
            <text:p>- studene! maslo nakrajame na male kocky</text:p>
            <text:p>- maslo pridame do mixeru a zamiesame na mrvenicku</text:p>
            <text:p>- potom pridame vajce </text:p>
            <text:p>- postupne pridavame vodu kym nemame cesto</text:p>
            <text:p>- zabalime do folie a nechame v chladnicke aspon 30 minut</text:p>
            <text:p/>
            <text:p>- pecieme na 180C</text:p>
            <text:p/>
            <text:p>mozeme piect naslepo (najprv zatazene bez plnky 10 minut, potom 5 minut nezatazene, potom s plnkou)</text:p>
          </table:table-cell>
          <table:table-cell table:style-name="ce17" office:value-type="string" calcext:value-type="string">
            <text:p><text:a xlink:href="https://basicswithbabish.co/basicsepisodes/pies" xlink:type="simple">kucharska biblia 294 + https://basicswithbabish.co/basicsepisodes/pies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raskove risotto</text:p>
          </table:table-cell>
          <table:table-cell table:style-name="ce9" office:value-type="string" calcext:value-type="string">
            <text:p>- hrncek risotto ryze</text:p>
            <text:p>- 1l vyvaru/bujonu</text:p>
            <text:p>- hrasok</text:p>
            <text:p>- cibula</text:p>
            <text:p>- cierne korenie</text:p>
            <text:p>- sol</text:p>
            <text:p>(-cesnak)</text:p>
            <text:p/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Parene buchty (z kvasku)</text:p>
          </table:table-cell>
          <table:table-cell table:style-name="ce9" office:value-type="string" calcext:value-type="string">
            <text:p>rozkvas:</text:p>
            <text:p>150 g pšeničnej hrubej múky</text:p>
            <text:p>140 g vody</text:p>
            <text:p>1 PL materského kvásku</text:p>
            <text:p/>
            <text:p>cesto:</text:p>
            <text:p>350 g pšeničnej hrubej múky</text:p>
            <text:p>110 g mlieka</text:p>
            <text:p>1 vajce</text:p>
            <text:p>2 ČL sladu</text:p>
            <text:p>3 PL oleja</text:p>
            <text:p>1-2 ČL soli (podľa našej preferencie chuti)</text:p>
            <text:p>+napln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rozkvas 6-12h</text:p>
            <text:p>vsetky suroviny zmiesame (muku davat nakoniec)</text:p>
            <text:p>cesto sa ma odliepat, byt pevne</text:p>
            <text:p>kvasenie 2-3h, po hodine vytlacit bublinky</text:p>
            <text:p>vyvalkat na 1cm, vykrojit kruzky/stvorce, naplnit, urobit gulicku</text:p>
            <text:p>buchty ukladame na pomucenu dosku, prekryjeme</text:p>
            <text:p>kvasenie 1-1.5h (130% objem) </text:p>
            <text:p>parime 1 minutu za kazdy 1cm velkosti vykrojenia, parak potrieme olejom</text:p>
            <text:p>po vybrati potrieme maslom aby ostali hladke</text:p>
            <text:p/>
          </table:table-cell>
          <table:table-cell table:style-name="ce17" office:value-type="string" calcext:value-type="string">
            <text:p><text:a xlink:href="https://chutodnaty.sk/parene-buchty-2/" xlink:type="simple">https://chutodnaty.sk/parene-buchty-2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ableves (bablavéš)</text:p>
          </table:table-cell>
          <table:table-cell table:style-name="ce9" office:value-type="string" calcext:value-type="string">
            <text:p>500g udene maso</text:p>
            <text:p>sol</text:p>
            <text:p>cierne korenie</text:p>
            <text:p>bobkovy list</text:p>
            <text:p>1 hlavicka cesnaku (cely cesnak)</text:p>
            <text:p>250g susenej fazule</text:p>
            <text:p>1 cibula</text:p>
            <text:p>400g zemiakov / siroke rezance</text:p>
            <text:p>3PL olej</text:p>
            <text:p>2PL muka</text:p>
            <text:p>2PL stiplava paprika</text:p>
            <text:p>30ml mlieko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mozno</text:p>
          </table:table-cell>
          <table:table-cell table:style-name="ce4" office:value-type="string" calcext:value-type="string">
            <text:p>vecer pred dame namocit fazulu, pripadne mozeme aj maso</text:p>
            <text:p/>
            <text:p>maso umyjeme, odstranime sietku</text:p>
            <text:p>dame varit maso s bobkovym listom, solou, ciernym korenim, pretlacenym 1/2 cesnaku, do 2l vody</text:p>
            <text:p/>
            <text:p>ked je maso polomakke (cca 1h) pridat fazule</text:p>
            <text:p/>
            <text:p>ked je fazula skoro makka pridame zemiaky nakrajane na kocky a celu cibulu</text:p>
            <text:p/>
            <text:p>(alternativa su siroke rezance, varene bokom alebo v polievke)</text:p>
            <text:p>ked su zemiaky hotove (cca po 10min) vyberieme maso</text:p>
            <text:p>urobime z oleja, muky, zvysku cesnaku, papriky a mlieka "zatrepku" (zahustovadlo)</text:p>
            <text:p>postupne vmiesame "zatrepku" do polievky a privedieme ku varu</text:p>
            <text:p/>
            <text:p>maso nakrajame a pridame naspat do polievky</text:p>
          </table:table-cell>
          <table:table-cell table:style-name="ce17" office:value-type="string" calcext:value-type="string">
            <text:p><text:a xlink:href="https://www.mindmegette.hu/bableves-fustolt-hussal.recept/" xlink:type="simple">https://www.mindmegette.hu/bableves-fustolt-hussal.recept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rášková polievka</text:p>
          </table:table-cell>
          <table:table-cell table:style-name="ce9" office:value-type="string" calcext:value-type="string">
            <text:p>hrášok čerstvý/mrazený</text:p>
            <text:p>zaprazka</text:p>
            <text:p>zemiaky</text:p>
            <text:p>mletá paprika</text:p>
            <text:p>cesnak</text:p>
            <text:p>soľ</text:p>
          </table:table-cell>
          <table:table-cell table:style-name="ce6" table:content-validation-name="val2"/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foccacia</text:p>
          </table:table-cell>
          <table:table-cell table:style-name="ce9" office:value-type="string" calcext:value-type="string">
            <text:p>100% muka</text:p>
            <text:p>2% olivovy olej</text:p>
            <text:p>76% voda</text:p>
            <text:p>1.8% sol</text:p>
            <text:p>19% starter (100% hydr.)</text:p>
            <text:p/>
            <text:p>nieco na vrch (sol, olivy, paradajky, cesnak, cibula, rozmarin...)</text:p>
            <text:p>olivovy olej na poliatie pred pecenim</text:p>
          </table:table-cell>
          <table:table-cell table:style-name="ce6" table:content-validation-name="val2" office:value-type="string" calcext:value-type="string">
            <text:p>koláč</text:p>
          </table:table-cell>
          <table:table-cell table:style-name="ce14" table:content-validation-name="val3" office:value-type="string" calcext:value-type="string">
            <text:p>ano?</text:p>
          </table:table-cell>
          <table:table-cell table:style-name="ce4" office:value-type="string" calcext:value-type="string">
            <text:p>("bakers percentages" - vyjadrene v pomere hmotnosti  ku hmotnosti vsetkej muky)</text:p>
            <text:p/>
            <text:p>2h bulk, 4h proof</text:p>
            <text:p>nadierkovat, posypat, poliat </text:p>
          </table:table-cell>
          <table:table-cell table:style-name="ce17" office:value-type="string" calcext:value-type="string">
            <text:p><text:a xlink:href="https://www.theperfectloaf.com/a-simple-focaccia/" xlink:type="simple">https://www.theperfectloaf.com/a-simple-focaccia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izza 2 (sourdough)</text:p>
          </table:table-cell>
          <table:table-cell table:style-name="ce9" office:value-type="string" calcext:value-type="string">
            <text:p>90% (288g) Type 00 White Flour (I used Central Milling Type 00 Normal)</text:p>
            <text:p>10% (32g) Whole Wheat Flour (I used Giusto's Stoneground)        </text:p>
            <text:p>67% (215g) Water</text:p>
            <text:p>2% (6g) Salt</text:p>
            <text:p>15% (48g) Mature, liquid starter</text:p>
            <text:p>0.5% (2g)        Diastatic Malt (optional)</text:p>
            <text:p/>
            <text:p>(gramy na 2 porcie)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(bakers percentages)</text:p>
            <text:p>mix</text:p>
            <text:p>warm bulk fermentation 2h - every 30min stretch and fold</text:p>
            <text:p>cold bulk fermentation 11h</text:p>
            <text:p>divide and ball</text:p>
            <text:p>proof 5-6h</text:p>
            <text:p>bake 285degC 6min</text:p>
          </table:table-cell>
          <table:table-cell table:style-name="ce17" office:value-type="string" calcext:value-type="string">
            <text:p><text:a xlink:href="https://www.theperfectloaf.com/sourdough-pizza-dough-and-recipes/" xlink:type="simple">https://www.theperfectloaf.com/sourdough-pizza-dough-and-recipes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innamon rolls</text:p>
          </table:table-cell>
          <table:table-cell table:style-name="ce10"/>
          <table:table-cell table:style-name="ce6" table:content-validation-name="val2"/>
          <table:table-cell table:content-validation-name="val3"/>
          <table:table-cell table:style-name="ce4"/>
          <table:table-cell table:style-name="ce17" office:value-type="string" calcext:value-type="string">
            <text:p><text:a xlink:href="https://www.theperfectloaf.com/sourdough-cinnamon-rolls/" xlink:type="simple">https://www.theperfectloaf.com/sourdough-cinnamon-rolls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lieb podla perfectloaf</text:p>
          </table:table-cell>
          <table:table-cell table:style-name="ce9" office:value-type="string" calcext:value-type="string">
            <text:p>80% obycajna muka</text:p>
            <text:p>20% specialna muka</text:p>
            <text:p>62-70% voda</text:p>
            <text:p>2% sol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mix or autolysis+mix</text:p>
            <text:p>2-3h bulk fermentation (every 30 minutes stretch&amp;fold)</text:p>
            <text:p>pre-shape, 35min rest</text:p>
            <text:p>shape, put to basket</text:p>
            <text:p>proof 4h or overnight</text:p>
            <text:p>bake - preheat 230C, inside combo cooker, 20min closed, 35min open</text:p>
            <text:p/>
            <text:p>alt:</text:p>
            <text:p/>
            <text:p>mix + autolysis 30min + salt</text:p>
            <text:p>6x every 30min stretch&amp;fold (sum 3h)</text:p>
            <text:p>put to baking form, proof 5-9h</text:p>
            <text:p>bake</text:p>
            <text:p/>
            <text:p>let cool uncovered</text:p>
          </table:table-cell>
          <table:table-cell table:style-name="ce17" office:value-type="string" calcext:value-type="string">
            <text:p><text:a xlink:href="https://www.theperfectloaf.com/a-return-to-basics/" xlink:type="simple">https://www.theperfectloaf.com/a-return-to-basics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icken fingers (from community)</text:p>
          </table:table-cell>
          <table:table-cell table:style-name="ce9" office:value-type="string" calcext:value-type="string">
            <text:p>Brine:</text:p>
            <text:p>- voda z kyslych uhoriek</text:p>
            <text:p>- buttermilk? (cmar?) / mlieko</text:p>
            <text:p>- sol</text:p>
            <text:p>- cierne korenie</text:p>
            <text:p>- kayenska paprika</text:p>
            <text:p>- sladka paprika</text:p>
            <text:p>- bobkovy list</text:p>
            <text:p/>
            <text:p>Kurata:</text:p>
            <text:p>- kuracie maso (tenders)</text:p>
            <text:p>- olej</text:p>
            <text:p>- bielka vajicok</text:p>
            <text:p>- muka</text:p>
            <text:p>- garlic powder</text:p>
            <text:p>- onion powder</text:p>
            <text:p>- kayenska paprika</text:p>
            <text:p>- sol</text:p>
            <text:p>- cierne korenie</text:p>
            <text:p>- conrflakes podrvene</text:p>
            <text:p>- kukuricny skrob</text:p>
            <text:p/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nalozime kurata a nechame stat 8-48h</text:p>
            <text:p/>
            <text:p>zmiesame suche prisady</text:p>
            <text:p/>
            <text:p>obalujeme vajicko -&gt; suche prisady -&gt; 10 minut cakanie</text:p>
            <text:p>fritujeme 5-8 minut alebo do 75C interna teplota</text:p>
            <text:p>nechame vychladnut</text:p>
          </table:table-cell>
          <table:table-cell table:style-name="ce17" office:value-type="string" calcext:value-type="string">
            <text:p><text:a xlink:href="https://www.youtube.com/watch?v=MJoSs4BGaHI" xlink:type="simple">https://www.youtube.com/watch?v=MJoSs4BGaHI</text:a></text:p>
          </table:table-cell>
          <table:table-cell table:style-name="ce17" office:value-type="string" calcext:value-type="string">
            <text:p><text:a xlink:href="https://www.bingingwithbabish.com/recipes/chicken-fingers-community" xlink:type="simple">https://www.bingingwithbabish.com/recipes/chicken-fingers-community</text:a>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"spisske" bryndzove halusky</text:p>
          </table:table-cell>
          <table:table-cell table:style-name="ce9" office:value-type="string" calcext:value-type="string">
            <text:p>- 600g zemiaky varny typ B ("stare")</text:p>
            <text:p>- 200g polohruba muka</text:p>
            <text:p>- sol</text:p>
            <text:p>- hruba muka na dohustenie</text:p>
            <text:p>- 250g bryndza</text:p>
            <text:p>- 150g udena slanina na skvarky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mozno</text:p>
          </table:table-cell>
          <table:table-cell table:style-name="ce4" office:value-type="string" calcext:value-type="string">
            <text:p>Zemiaky ocistime, postruhame na jemno, pridame trochu sol aby pustili stavu.</text:p>
            <text:p>Pridame muku (cca 3:1 zemiak:muka) premiesame, nechame postat, skontrolujeme hustotu pripadne dohustime.</text:p>
            <text:p>Sadzame do vriacej osolenej vody. Vyberame z vody, zmiesame s bryndzou, mozeme pridat skrobovu vodu na rozriedenie.</text:p>
          </table:table-cell>
          <table:table-cell table:style-name="ce17" office:value-type="string" calcext:value-type="string">
            <text:p><text:a xlink:href="https://pecene-varene.sk/recipe-items/spisske-bryndzove-halusky/" xlink:type="simple">https://pecene-varene.sk/recipe-items/spisske-bryndzove-halusky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ico de gallo</text:p>
          </table:table-cell>
          <table:table-cell table:style-name="ce9" office:value-type="string" calcext:value-type="string">
            <text:p>1 cup finely chopped white onion (about 1 small onion)</text:p>
            <text:p>1 medium jalapeño or serrano pepper, ribs and seeds removed, finely chopped (decrease or omit if sensitive to spice, or add another if you love heat)</text:p>
            <text:p>¼ cup lime juice</text:p>
            <text:p>¾ teaspoon fine sea salt, more to taste</text:p>
            <text:p>1 ½ pounds ripe red tomatoes (about 8 small or 4 large), chopped</text:p>
            <text:p>½ cup finely chopped fresh cilantro (about 1 bunch)</text:p>
            <text:p/>
          </table:table-cell>
          <table:table-cell table:style-name="ce6" table:content-validation-name="val2"/>
          <table:table-cell table:content-validation-name="val3"/>
          <table:table-cell table:style-name="ce4"/>
          <table:table-cell table:style-name="ce17" office:value-type="string" calcext:value-type="string">
            <text:p><text:a xlink:href="https://cookieandkate.com/classic-pico-de-gallo-recipe/" xlink:type="simple">https://cookieandkate.com/classic-pico-de-gallo-recipe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ajitas seasoning</text:p>
          </table:table-cell>
          <table:table-cell table:style-name="ce9" office:value-type="string" calcext:value-type="string">
            <text:p>1 tablespoon cornstarch</text:p>
            <text:p>2 teaspoons chili powder</text:p>
            <text:p>1 teaspoon salt</text:p>
            <text:p>1 teaspoon paprika</text:p>
            <text:p>1 teaspoon white sugar</text:p>
            <text:p>½ teaspoon onion powder</text:p>
            <text:p>½ teaspoon garlic powder</text:p>
            <text:p>¼ teaspoon cayenne pepper</text:p>
            <text:p>½ teaspoon ground cumin</text:p>
          </table:table-cell>
          <table:table-cell table:style-name="ce6" table:content-validation-name="val2"/>
          <table:table-cell table:content-validation-name="val3"/>
          <table:table-cell table:style-name="ce4"/>
          <table:table-cell table:style-name="ce17" office:value-type="string" calcext:value-type="string">
            <text:p><text:a xlink:href="https://www.allrecipes.com/recipe/232967/fajita-seasoning/" xlink:type="simple">https://www.allrecipes.com/recipe/232967/fajita-seasoning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olac tety jelenovej sous vide do 600ml nadoby</text:p>
          </table:table-cell>
          <table:table-cell table:style-name="ce4" office:value-type="string" calcext:value-type="string">
            <text:p>1 vajce (50g)</text:p>
            <text:p>100g muka</text:p>
            <text:p>70g cukor</text:p>
            <text:p>4g prasok do peciva</text:p>
            <text:p>25-30g oleja</text:p>
            <text:p>40-45g mlieka</text:p>
            <text:p>+ pridavky ak chcete</text:p>
          </table:table-cell>
          <table:table-cell table:style-name="ce6" table:content-validation-name="val2"/>
          <table:table-cell table:content-validation-name="val3"/>
          <table:table-cell table:number-columns-repeated="1020"/>
        </table:table-row>
        <table:table-row table:style-name="ro2">
          <table:table-cell table:style-name="ce6" office:value-type="string" calcext:value-type="string">
            <text:p>kuracie prsia sous vide </text:p>
          </table:table-cell>
          <table:table-cell table:style-name="ce9" office:value-type="string" calcext:value-type="string">
            <text:p>kuracie prsia</text:p>
            <text:p>sol</text:p>
            <text:p>korenie</text:p>
            <text:p>aromatics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Very soft and juicy, served hot - 60C 1.5-4h</text:p>
            <text:p>Tender and juicy, served cold (for cold chicken salad) - 66C 1-4h</text:p>
            <text:p>Juicy, tender and slightly stringy, served hot - 66C 1-4h</text:p>
            <text:p>Traditional, juicy, firm and slightly stringy, served hot - 71C 1-4h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orcacie prsia sous vide</text:p>
          </table:table-cell>
          <table:table-cell table:style-name="ce9" office:value-type="string" calcext:value-type="string">
            <text:p>morcacie prsia</text:p>
            <text:p>sol</text:p>
            <text:p>korenie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62.8C 2-4h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ravcove kare sous vide (1)</text:p>
          </table:table-cell>
          <table:table-cell table:style-name="ce9" office:value-type="string" calcext:value-type="string">
            <text:p>bravcove kare</text:p>
            <text:p>sol</text:p>
            <text:p>korenie</text:p>
            <text:p>rasca</text:p>
            <text:p>(cesnak)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63C 3-4h (tuhe nie moc dobre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ravcove kare sous vide (2)</text:p>
          </table:table-cell>
          <table:table-cell table:style-name="ce9" office:value-type="string" calcext:value-type="string">
            <text:p>bravcove kare</text:p>
            <text:p>sol</text:p>
            <text:p>korenie</text:p>
            <text:p>rasca</text:p>
            <text:p>(cesnak)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71C 12h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asala chai</text:p>
          </table:table-cell>
          <table:table-cell table:style-name="ce9" office:value-type="string" calcext:value-type="string">
            <text:p>- (Fresh) Ginger</text:p>
            <text:p>- Green Cardamom pods</text:p>
            <text:p>- Cloves</text:p>
            <text:p>- Cinnamon</text:p>
            <text:p>- Black Peppercorns</text:p>
            <text:p/>
            <text:p>- cierny caj (assai, ...)</text:p>
          </table:table-cell>
          <table:table-cell table:style-name="ce6" table:content-validation-name="val2" office:value-type="string" calcext:value-type="string">
            <text:p>koláč</text:p>
          </table:table-cell>
          <table:table-cell table:style-name="ce14" table:content-validation-name="val3" office:value-type="string" calcext:value-type="string">
            <text:p>nie?</text:p>
          </table:table-cell>
          <table:table-cell table:style-name="ce4" office:value-type="string" calcext:value-type="string">
            <text:p>Start with gathering the basic ingredients and the spices you want to add to your chai.</text:p>
            <text:p>Heat up about 1 ⅓ cup of water in a pot on medium-high heat. (This is for 2 cups of chai)</text:p>
            <text:p>While water is heating, crush spices using a mortar and pestle or a coffee/spice grinder. Add the crushed spices to the water.</text:p>
            <text:p>Grate the ginger directly into the pot of water.</text:p>
            <text:p>Reduce heat to medium and bring the water to a boil.</text:p>
            <text:p>Now add the tea leaves and let it boil for a minute. You can also add sugar at this time or add it in the cup when serving.</text:p>
            <text:p>Add ¾ cup of milk and stir it in.</text:p>
            <text:p>Bring the tea to a boil. The tea can overflow easily, so keep a close eye.</text:p>
            <text:p>Once the tea comes to a boil. Turn off the gas and cover with a lid for one minute.</text:p>
            <text:p>Strain the tea in a cup and enjoy!</text:p>
          </table:table-cell>
          <table:table-cell table:style-name="ce17" office:value-type="string" calcext:value-type="string">
            <text:p><text:a xlink:href="https://pipingpotcurry.com/indian-masala-chai/" xlink:type="simple">https://pipingpotcurry.com/indian-masala-chai/</text:a>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chili con carne (india) (chilli)</text:p>
          </table:table-cell>
          <table:table-cell table:style-name="ce9" office:value-type="string" calcext:value-type="string">
            <text:p>- mleté mäso 500g </text:p>
            <text:p>- cibuľa, fazuľa</text:p>
            <text:p>- (cesnak)</text:p>
            <text:p>- paradajkový pretlak/krájané</text:p>
            <text:p>- škorica</text:p>
            <text:p>- rasca</text:p>
            <text:p>- soľ</text:p>
            <text:p>- chili</text:p>
          </table:table-cell>
          <table:table-cell table:style-name="ce6" table:content-validation-name="val2"/>
          <table:table-cell table:content-validation-name="val3"/>
          <table:table-cell table:style-name="ce4"/>
          <table:table-cell table:number-columns-repeated="1019"/>
        </table:table-row>
        <table:table-row table:style-name="ro5">
          <table:table-cell table:style-name="ce6" office:value-type="string" calcext:value-type="string">
            <text:p>red lentil dahl /daal z červenej šošovice </text:p>
          </table:table-cell>
          <table:table-cell table:style-name="ce11" office:value-type="string" calcext:value-type="string">
            <text:p>- červená šošovica 300g- 1-2tbsp (kokosového) oleja - 2 cibule diced - 4 mesiačiky cesnaku minced - 2 tsp zázvoru minced - 1 tsp each of turmeric, coriander, cumin, red paprika,garam masal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/>
          <table:table-cell table:style-name="ce17" office:value-type="string" calcext:value-type="string">
            <text:p><text:a xlink:href="https://biancazapatka.com/en/red-lentil-dahl/" xlink:type="simple">https://biancazapatka.com/en/red-lentil-dahl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ráškova polievka s haluškami (babička Lesanská)</text:p>
          </table:table-cell>
          <table:table-cell table:style-name="ce9" office:value-type="string" calcext:value-type="string">
            <text:p>- hrasok 500g</text:p>
            <text:p>- hladka muka 2pl</text:p>
            <text:p>- mleta sladka paprika</text:p>
            <text:p>- hruba muka 3pl</text:p>
            <text:p>- vajce</text:p>
            <text:p>- sol</text:p>
          </table:table-cell>
          <table:table-cell table:style-name="ce6" table:content-validation-name="val2"/>
          <table:table-cell table:content-validation-name="val3"/>
          <table:table-cell table:style-name="ce4" office:value-type="string" calcext:value-type="string">
            <text:p>umyť hrášok, povariť kým nie je mäkký, pridať zápražku s paprikou, pridať halušky (vajce, hrubá múka 2pl, soľ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krupicová kaša</text:p>
          </table:table-cell>
          <table:table-cell table:style-name="ce9" office:value-type="string" calcext:value-type="string">
            <text:p>100g krupica</text:p>
            <text:p>1l mlieka</text:p>
            <text:p>40g cukru</text:p>
          </table:table-cell>
          <table:table-cell table:style-name="ce6" table:content-validation-name="val2" office:value-type="string" calcext:value-type="string">
            <text:p>mal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 office:value-type="string" calcext:value-type="string">
            <text:p>do vriaceho mlieka nasypeme suroviny a miešame kým nezhust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erník</text:p>
          </table:table-cell>
          <table:table-cell table:style-name="ce9" office:value-type="string" calcext:value-type="string">
            <text:p>100ml olej</text:p>
            <text:p>400g muka</text:p>
            <text:p>300g praskovy cukor</text:p>
            <text:p>2PL soda bikarbona</text:p>
            <text:p>1PL kakao</text:p>
            <text:p>1cL skorica</text:p>
            <text:p>3PL dzem</text:p>
            <text:p>0,5l mlieko</text:p>
            <text:p>1ks kypriaci prasok do pernika</text:p>
            <text:p>2ks vajcia </text:p>
            <text:p/>
            <text:p>+dzem a cokoladova poleva</text:p>
          </table:table-cell>
          <table:table-cell table:style-name="ce6" table:content-validation-name="val2" office:value-type="string" calcext:value-type="string">
            <text:p>koláč</text:p>
          </table:table-cell>
          <table:table-cell table:style-name="ce14" table:content-validation-name="val3" office:value-type="string" calcext:value-type="string">
            <text:p>mozno</text:p>
          </table:table-cell>
          <table:table-cell table:style-name="ce4" office:value-type="string" calcext:value-type="string">
            <text:p>vsetko spolu, 25-30 minút na 180 stupňov (kontrolovat po 18min), vychladnute potriet</text:p>
          </table:table-cell>
          <table:table-cell table:style-name="ce17" office:value-type="string" calcext:value-type="string">
            <text:p><text:a xlink:href="https://varecha.pravda.sk/recepty/pernik-ako-pavucinka/32980-recept.html" xlink:type="simple">https://varecha.pravda.sk/recepty/pernik-ako-pavucinka/32980-recept.html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ievance </text:p>
          </table:table-cell>
          <table:table-cell table:style-name="ce9" office:value-type="string" calcext:value-type="string">
            <text:p>200g hladká múka </text:p>
            <text:p>250ml mlieko </text:p>
            <text:p>2ks vajcia</text:p>
            <text:p>50g kryštálový cukor</text:p>
            <text:p>1ks (12g) prasok do pečiva</text:p>
            <text:p>1 vanilkový cukor</text:p>
            <text:p>2 lyzice olej</text:p>
          </table:table-cell>
          <table:table-cell table:style-name="ce6" table:content-validation-name="val2" office:value-type="string" calcext:value-type="string">
            <text:p>koláč</text:p>
          </table:table-cell>
          <table:table-cell table:style-name="ce14" table:content-validation-name="val3" office:value-type="string" calcext:value-type="string">
            <text:p>mozno</text:p>
          </table:table-cell>
          <table:table-cell table:style-name="ce4" office:value-type="string" calcext:value-type="string">
            <text:p>zmiešať suché+žĺtka+mlieko+olej+sneh (s polovicou cukru vyšľahaný)</text:p>
          </table:table-cell>
          <table:table-cell table:style-name="ce17" office:value-type="string" calcext:value-type="string">
            <text:p><text:a xlink:href="https://varecha.pravda.sk/recepty/lahunke-lievance/48699-recept.html" xlink:type="simple">https://varecha.pravda.sk/recepty/lahunke-lievance/48699-recept.html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čené fašírky</text:p>
          </table:table-cell>
          <table:table-cell table:style-name="ce9" office:value-type="string" calcext:value-type="string">
            <text:p>500g mlete maso</text:p>
            <text:p>cesnak</text:p>
            <text:p>cibula</text:p>
            <text:p>sol</text:p>
            <text:p>majoranka</text:p>
            <text:p>struhanka/rozok/ovsene vlocky</text:p>
            <text:p>(korenie - vegeta, petrzl. vnat)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Urobit gulicky a tie splacatit na cca 3cm. Piect na 180C horny+spodny ohrev, 35-45min.</text:p>
            <text:p/>
            <text:p>Povodne instrukcie: "To čo do normálnych. Teda mleté mäso, cesnak, cibuľa, soľ, majoránka. Môže byť na zahustenie namočený rožok, strúhanka alebo ovsené vločky.  Môžeš dať aj vegetu, petrz. vňať,...Urobíš guličky, dáš na mastný papier a pečieš na 200-250C, cca 45 min, prip. podľa potreby."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alušky prílohové (perkelt)</text:p>
          </table:table-cell>
          <table:table-cell table:style-name="ce9" office:value-type="string" calcext:value-type="string">
            <text:p>300g polohrubá múka 1 vajce 1 lyzicka soli vlažná voda podľa potreby </text:p>
          </table:table-cell>
          <table:table-cell table:style-name="ce6" table:content-validation-name="val2"/>
          <table:table-cell table:content-validation-name="val3"/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kuracie stehienka ako od mamy (parnicki)</text:p>
          </table:table-cell>
          <table:table-cell table:style-name="ce9" office:value-type="string" calcext:value-type="string">
            <text:p>kuracie stehna</text:p>
            <text:p>sol</text:p>
            <text:p>majoran</text:p>
            <text:p>olej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nie</text:p>
          </table:table-cell>
          <table:table-cell table:style-name="ce4" office:value-type="string" calcext:value-type="string">
            <text:p>kuracie stehna omastime, posolime a pomajorankujeme, vlozime na plech,</text:p>
            <text:p>pecieme na horny-spodny ohrev pri 200C asi 45-90minu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kolske rizoto</text:p>
          </table:table-cell>
          <table:table-cell table:style-name="ce9" office:value-type="string" calcext:value-type="string">
            <text:p>ryza</text:p>
            <text:p>kuracie maso</text:p>
            <text:p>cibula</text:p>
            <text:p>hrasok</text:p>
            <text:p>kukuricka</text:p>
            <text:p>(voda z hrasku)</text:p>
            <text:p/>
            <text:p>paprika</text:p>
            <text:p>cierne korenie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urobit ryzu, cibulku do sklovita, kuracie na drobno orestovat a podusit, osolit, okorenit,</text:p>
            <text:p> pridat hrasok a kukuricu chviku podusit (pripadne pridat vodu a dosolit),  zmiesat s ryzou</text:p>
          </table:table-cell>
          <table:table-cell table:style-name="ce17" office:value-type="string" calcext:value-type="string">
            <text:p><text:a xlink:href="https://www.letemgastrosvetem.cz/2017/01/14/rizoto-jako-ze-skolni-jidely/" xlink:type="simple">https://www.letemgastrosvetem.cz/2017/01/14/rizoto-jako-ze-skolni-jidely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ulled pork sandwich</text:p>
          </table:table-cell>
          <table:table-cell table:style-name="ce9" office:value-type="string" calcext:value-type="string">
            <text:p>bravčové mäso (napr. plece)</text:p>
            <text:p>mletá paprika</text:p>
            <text:p>sol</text:p>
            <text:p>mletá rasca</text:p>
            <text:p>hnedý cukor</text:p>
            <text:p>olej</text:p>
            <text:p>(mleté čierne korenie, chili, mletý cesnak, mletá cibuľa, )</text:p>
            <text:p>pečivo</text:p>
            <text:p>šalát (rukola,...)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 office:value-type="string" calcext:value-type="string">
            <text:p>do pekáča dáme okorenené mäso, zakryjeme a dusíme (môžeme podliať na začiatku) 3h pri 150°C, potom odokryjeme a pečieme ešte 1-2h aby vznikla krusta</text:p>
          </table:table-cell>
          <table:table-cell table:style-name="ce17" office:value-type="string" calcext:value-type="string">
            <text:p><text:a xlink:href="https://tastesbetterfromscratch.com/pulled-pork/" xlink:type="simple">https://tastesbetterfromscratch.com/pulled-pork/</text:a>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hakshuka</text:p>
          </table:table-cell>
          <table:table-cell table:style-name="ce12" office:value-type="string" calcext:value-type="string">
            <text:p>paradajky 500g, cibuľa, paprika, olivový olej alebo maslo, cesnak, 2čl mletej rasce, 1čl mletej papriky, čierne korenie, soľ, </text:p>
          </table:table-cell>
          <table:table-cell table:style-name="ce7" table:content-validation-name="val2"/>
          <table:table-cell table:style-name="ce4" table:content-validation-name="val3"/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6" office:value-type="string" calcext:value-type="string">
            <text:p>cherry pie filling </text:p>
          </table:table-cell>
          <table:table-cell table:style-name="ce9" office:value-type="string" calcext:value-type="string">
            <text:p>100g čerešní bez kôstky, 60g cukor, 1/2 citrónová šťava, škrob </text:p>
          </table:table-cell>
          <table:table-cell table:style-name="ce6" table:content-validation-name="val2"/>
          <table:table-cell table:content-validation-name="val3"/>
          <table:table-cell table:style-name="ce16" office:value-type="string" calcext:value-type="string">
            <text:p><text:a xlink:href="https://tastesbetterfromscratch.com/cherry-pie/" xlink:type="simple">https://tastesbetterfromscratch.com/cherry-pie/</text:a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zemiaky v mikrovlnke</text:p>
          </table:table-cell>
          <table:table-cell table:style-name="ce9" office:value-type="string" calcext:value-type="string">
            <text:p>2 veľké/3 stredné zemiaky</text:p>
          </table:table-cell>
          <table:table-cell table:style-name="ce6" table:content-validation-name="val2" office:value-type="string" calcext:value-type="string">
            <text:p>príloha</text:p>
          </table:table-cell>
          <table:table-cell table:content-validation-name="val3"/>
          <table:table-cell table:style-name="ce4" office:value-type="string" calcext:value-type="string">
            <text:p>očistiť zemiak od nečistôt šuchaním pod vodou, osušiť, dať do taniera, popichať vidličkou, na max (900w) 3-4 min, otočiť zemiaky zopakovať, prípadne pridať po minúte kým nie sú fluffy. posoliť a servírovať s maslom 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yza na sushi</text:p>
          </table:table-cell>
          <table:table-cell table:style-name="ce9" office:value-type="string" calcext:value-type="string">
            <text:p>ryza</text:p>
            <text:p>sol</text:p>
            <text:p>voda</text:p>
          </table:table-cell>
          <table:table-cell table:style-name="ce6" table:content-validation-name="val2"/>
          <table:table-cell table:content-validation-name="val3"/>
          <table:table-cell table:style-name="ce4" office:value-type="string" calcext:value-type="string">
            <text:p>ako normalna ryza, menej soli, viac vody, menej premyvat (?)</text:p>
            <text:p/>
            <text:p>2hrnceky vody na hrncek ryze</text:p>
            <text:p/>
            <text:p>(doviezt do varu na plnom plyne, varit kym nezmizne voda na stredno, potom prikryt, zohriat na minime plynu, nechat odstat bez plynu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egedin</text:p>
          </table:table-cell>
          <table:table-cell table:style-name="ce9" office:value-type="string" calcext:value-type="string">
            <text:p>bravcove plece 1.5kg</text:p>
            <text:p>kysla kapusta 1kg</text:p>
            <text:p>cibula</text:p>
            <text:p>sladka smotana</text:p>
            <text:p>rasca</text:p>
            <text:p>cervena paprika mleta</text:p>
            <text:p>hladka muka</text:p>
            <text:p>cukor</text:p>
            <text:p>sol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/>
          <table:table-cell table:style-name="ce17" office:value-type="string" calcext:value-type="string">
            <text:p><text:a xlink:href="https://varecha.pravda.sk/recepty/segedinsky-gulas/31667-recept.html" xlink:type="simple">https://varecha.pravda.sk/recepty/segedinsky-gulas/31667-recept.html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acacie prsia s kozou (sous vide)</text:p>
          </table:table-cell>
          <table:table-cell table:style-name="ce9" office:value-type="string" calcext:value-type="string">
            <text:p>kacacie prsia</text:p>
            <text:p>cierne korenie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ano</text:p>
          </table:table-cell>
          <table:table-cell table:style-name="ce4" office:value-type="string" calcext:value-type="string">
            <text:p>sous vide na 54°C na 2-4h (podla hrubky), pre safety aspon 58°C aspon 3h (vid process lethality spreadsheet a ine)</text:p>
          </table:table-cell>
          <table:table-cell table:style-name="ce17" office:value-type="string" calcext:value-type="string">
            <text:p><text:a xlink:href="https://www.seriouseats.com/sous-vide-101-duck-breast-recipe" xlink:type="simple">https://www.seriouseats.com/sous-vide-101-duck-breast-recipe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unel</text:p>
          </table:table-cell>
          <table:table-cell table:style-name="ce9" office:value-type="string" calcext:value-type="string">
            <text:p>Cesto:</text:p>
            <text:p> * 12 vajec</text:p>
            <text:p> * 220 g hladkej múky</text:p>
            <text:p> * 220 g práškového cukru</text:p>
            <text:p> * 1 lyžička sódy bikarbóny</text:p>
            <text:p> * 1 lyžica kakaa</text:p>
            <text:p>Plnka:</text:p>
            <text:p> * 0,5 l mlieka</text:p>
            <text:p> * 2 vanilkové pudingy</text:p>
            <text:p> * 250 g masla</text:p>
            <text:p> * 150 g práškového cukru</text:p>
            <text:p> * 1 marhuľový kompót</text:p>
            <text:p> * 2 banány</text:p>
            <text:p> * ríbezľový lekvár</text:p>
            <text:p>Poleva:</text:p>
            <text:p> * čokoládová</text:p>
          </table:table-cell>
          <table:table-cell table:style-name="ce6" table:content-validation-name="val2"/>
          <table:table-cell table:content-validation-name="val3"/>
          <table:table-cell table:style-name="ce4" office:value-type="string" calcext:value-type="string">
            <text:p>Postup práce:</text:p>
            <text:p>Vajcia vyšľaháme s cukrom, vmiešame múku a sódu bikarbónu. Rozdelíme na 2 časti a do jednej vmiešame kakao. Obe potom postupne upečieme.</text:p>
            <text:p>Kakaové cesto PO DĹŽKE rozdelíme na 2 diely, svetlé PO ŠÍRKE na 4 diely. Oblejeme ich nálevom z kompótu. (dobre ponočiť)</text:p>
            <text:p>Potrebujeme 2 formy. Do každej formy vložíme jeden diel kakaového cesta, dobre ho pritlačíme k stenám a potrieme časťou pudingového krému. Na krém poukladáme odkvapkané polovičky marhúľ a zatrieme ho ďalšou krémovou vrstvou, na ňu položíme po jednom diele svetlého cesta, potom trochu krému, kolieska banánu a znovu vrstvu krému. Potom dáme druhé svetlé cesto a pritlačíme. Odložíme do chladu. Po vychladnutí a vyklopení potrieme tenkou vrstvou lekvárom a polejeme čokoládovou polevou.</text:p>
            <text:p>Koláč je chutnejší ak namiesto uvedeného cesta použijeme cesto piškótové v 5 vajec svetlé, 5 vajec - kakaové!</text:p>
          </table:table-cell>
          <table:table-cell>
            <draw:frame table:end-cell-address="Recepty.F98" table:end-x="11.96pt" table:end-y="15.73pt" draw:z-index="0" draw:name="image1.jpg" draw:style-name="gr1" draw:text-style-name="P1" svg:width="11.96pt" svg:height="15.73pt" svg:x="0pt" svg:y="0pt">
              <draw:image xlink:href="Pictures/10000000000004A100000604F9022537B8CC76FE.jp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varohové guľky </text:p>
          </table:table-cell>
          <table:table-cell table:style-name="ce9" office:value-type="string" calcext:value-type="string">
            <text:p>250g tvarohu, 1 vajce, 1 vanilkový cukor, ~8 lyžíc krupice. na obaľovanie práškový cukor a strúhanka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style-name="ce14" table:content-validation-name="val3" office:value-type="string" calcext:value-type="string">
            <text:p>mozno</text:p>
          </table:table-cell>
          <table:table-cell table:style-name="ce4" office:value-type="string" calcext:value-type="string">
            <text:p>Na 1 vaničku tvarohu 1 vajce 1 vanilk. cukor, krupica (niekoľko lyžíc, nie veľa- nabudúce ich spocitam), hrsť hrozienok zamiešať do cesta alebo nejaké ovocie dovnútra. Hodíš do vriacej vody a čakáš, kým vyplávu na hladinu. Je dobré urobiť na začiatok pokus s 1 guľkou. Ak sa nerozpadne, pokračuj s ďalšími. Ak sa rozpadne, pridaj trocha krupice.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ummus</text:p>
          </table:table-cell>
          <table:table-cell table:style-name="ce9" office:value-type="string" calcext:value-type="string">
            <text:p>400g varený cícer, 50g tahini, 30ml olivový olej, 30ml citrónová šťava, 1 strúčik cesnaku, 1čl (3g) soli, voda 5 lyžíc podľa textúry </text:p>
          </table:table-cell>
          <table:table-cell table:style-name="ce6" table:content-validation-name="val2" office:value-type="string" calcext:value-type="string">
            <text:p>príloha</text:p>
          </table:table-cell>
          <table:table-cell table:content-validation-name="val3"/>
          <table:table-cell table:style-name="ce4" office:value-type="string" calcext:value-type="string">
            <text:p>všetko zmiešať a pomixovať v bullet mixeri alebo food processore</text:p>
          </table:table-cell>
          <table:table-cell table:style-name="ce17" office:value-type="string" calcext:value-type="string">
            <text:p><text:a xlink:href="https://www.loveandlemons.com/hummus-recipe/" xlink:type="simple">https://www.loveandlemons.com/hummus-recipe/</text:a>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egedínsky guláš </text:p>
          </table:table-cell>
          <table:table-cell table:style-name="ce9" office:value-type="string" calcext:value-type="string">
            <text:p>600g bravčový guláš (plece), 500g kyslá kapusta, 1 cibuľa, 250ml smotana na šľahanie, 2PL paprika mletá, 1čl rasca mletá, 2čl? soľ, mleté čierne korenie </text:p>
          </table:table-cell>
          <table:table-cell table:style-name="ce6" table:content-validation-name="val2" office:value-type="string" calcext:value-type="string">
            <text:p>veľké</text:p>
          </table:table-cell>
          <table:table-cell table:content-validation-name="val3"/>
          <table:table-cell table:style-name="ce4"/>
          <table:table-cell table:number-columns-repeated="1019"/>
        </table:table-row>
        <table:table-row table:style-name="ro2" table:number-rows-repeated="901">
          <table:table-cell table:style-name="ce6"/>
          <table:table-cell table:style-name="ce10"/>
          <table:table-cell table:style-name="ce6" table:content-validation-name="val2"/>
          <table:table-cell table:content-validation-name="val3"/>
          <table:table-cell table:style-name="ce4"/>
          <table:table-cell table:number-columns-repeated="1019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earch.$A$1" table:cell-range-address="$Recepty.$A$1:.$G$101"/>
        </table:named-expressions>
        <calcext:conditional-formats>
          <calcext:conditional-format calcext:target-range-address="Recepty.B1:Recepty.B74 Recepty.B76:Recepty.B1002">
            <calcext:condition calcext:apply-style-name="ConditionalStyle_1" calcext:value="formula-is(LEN(TRIM([.B1]))=0)" calcext:base-cell-address="Recepty.B1"/>
          </calcext:conditional-format>
        </calcext:conditional-formats>
      </table:table>
      <table:table table:name="Sheet2" table:style-name="ta3">
        <table:table-column table:style-name="co2" table:number-columns-repeated="1024" table:default-cell-style-name="Default"/>
        <table:table-row table:style-name="ro2">
          <table:table-cell table:style-name="ce13" office:value-type="string" calcext:value-type="string">
            <text:p>den</text:p>
          </table:table-cell>
          <table:table-cell table:style-name="ce13" office:value-type="string" calcext:value-type="string">
            <text:p>ranjaky</text:p>
          </table:table-cell>
          <table:table-cell table:style-name="ce13" office:value-type="string" calcext:value-type="string">
            <text:p>obed</text:p>
          </table:table-cell>
          <table:table-cell table:style-name="ce13" office:value-type="string" calcext:value-type="string">
            <text:p>vecer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o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ravcove</text:p>
          </table:table-cell>
          <table:table-cell table:style-name="ce14" office:value-type="string" calcext:value-type="string">
            <text:p>salat s niecim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ne</text:p>
          </table:table-cell>
          <table:table-cell table:style-name="ce14" office:value-type="string" calcext:value-type="string">
            <text:p>chlieb</text:p>
          </table:table-cell>
          <table:table-cell table:style-name="ce14" office:value-type="string" calcext:value-type="string">
            <text:p>pizza</text:p>
          </table:table-cell>
          <table:table-cell table:style-name="ce14" office:value-type="string" calcext:value-type="string">
            <text:p>granadi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po</text:p>
          </table:table-cell>
          <table:table-cell table:style-name="ce14" office:value-type="string" calcext:value-type="string">
            <text:p>musli</text:p>
          </table:table-cell>
          <table:table-cell table:style-name="ce14" office:value-type="string" calcext:value-type="string">
            <text:p>polievka z mrazenej zeleniny, 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t</text:p>
          </table:table-cell>
          <table:table-cell table:style-name="ce14" office:value-type="string" calcext:value-type="string">
            <text:p>chlieb s nutelou</text:p>
          </table:table-cell>
          <table:table-cell table:style-name="ce14" office:value-type="string" calcext:value-type="string">
            <text:p>kuraci salat</text:p>
          </table:table-cell>
          <table:table-cell table:style-name="ce14" office:value-type="string" calcext:value-type="string">
            <text:p>cestoviny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tr</text:p>
          </table:table-cell>
          <table:table-cell table:style-name="ce14" office:value-type="string" calcext:value-type="string">
            <text:p>chlieb so sunkou</text:p>
          </table:table-cell>
          <table:table-cell table:style-name="ce14" office:value-type="string" calcext:value-type="string">
            <text:p>maso s ryzou/cestovinami</text:p>
          </table:table-cell>
          <table:table-cell table:style-name="ce14" office:value-type="string" calcext:value-type="string">
            <text:p>rybie prsty s hranolkami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tv</text:p>
          </table:table-cell>
          <table:table-cell table:style-name="ce14" office:value-type="string" calcext:value-type="string">
            <text:p>hrianky s cesnakom</text:p>
          </table:table-cell>
          <table:table-cell table:style-name="ce14" office:value-type="string" calcext:value-type="string">
            <text:p>spenat s vajcom a zemiakmi</text:p>
          </table:table-cell>
          <table:table-cell table:style-name="ce14" office:value-type="string" calcext:value-type="string">
            <text:p>spenat znova!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pi</text:p>
          </table:table-cell>
          <table:table-cell table:style-name="ce14" office:value-type="string" calcext:value-type="string">
            <text:p>chlieb s maslom</text:p>
          </table:table-cell>
          <table:table-cell table:style-name="ce14" office:value-type="string" calcext:value-type="string">
            <text:p>fake rizoto</text:p>
          </table:table-cell>
          <table:table-cell table:style-name="ce14" office:value-type="string" calcext:value-type="string">
            <text:p>cestoviny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o</text:p>
          </table:table-cell>
          <table:table-cell table:style-name="ce14" office:value-type="string" calcext:value-type="string">
            <text:p>chlieb s niecim</text:p>
          </table:table-cell>
          <table:table-cell table:style-name="ce14" office:value-type="string" calcext:value-type="string">
            <text:p>tuniakovy salat</text:p>
          </table:table-cell>
          <table:table-cell table:style-name="ce14" office:value-type="string" calcext:value-type="string">
            <text:p>sosovicova polievk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ne</text:p>
          </table:table-cell>
          <table:table-cell table:style-name="ce14" office:value-type="string" calcext:value-type="string">
            <text:p>bravcove maso/bok-koleno/vajcia/vianocka</text:p>
          </table:table-cell>
          <table:table-cell/>
          <table:table-cell table:style-name="ce14" office:value-type="string" calcext:value-type="string">
            <text:p>babovk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po</text:p>
          </table:table-cell>
          <table:table-cell table:style-name="ce14" office:value-type="string" calcext:value-type="string">
            <text:p>chleba s maslom</text:p>
          </table:table-cell>
          <table:table-cell/>
          <table:table-cell table:style-name="ce14" office:value-type="string" calcext:value-type="string">
            <text:p>toasty s niecim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ut</text:p>
          </table:table-cell>
          <table:table-cell table:number-columns-repeated="3" table:style-name="ce14" office:value-type="string" calcext:value-type="string">
            <text:p>?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Kategórie" table:base-cell-address="$search.$A$1" table:cell-range-address="$Recepty.$C$2:.$C$1002"/>
      </table:named-expressions>
      <table:database-ranges>
        <table:database-range table:name="__Anonymous_Sheet_DB__1" table:target-range-address="Recepty.A1:Recepty.G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pty" style:display-name="PageStyle_Rece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45" meta:object-count="1"/>
    <meta:generator>LibreOfficeDev/6.0.5.2$Linux_X86_64 LibreOffice_project/</meta:generator>
  </office:meta>
</office:document-meta>
</file>